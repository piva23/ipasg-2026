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  <style:text-properties style:font-name="Arial" fo:font-size="14pt" style:font-size-asian="14pt" style:font-size-complex="14pt"/>
    </style:style>
    <style:style style:name="P2" style:parent-style-name="Standard" style:family="paragraph">
      <style:paragraph-properties fo:text-align="justify" fo:line-height="150%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justify" fo:line-height="150%"/>
      <style:text-properties style:font-name="Arial" fo:font-size="14pt" style:font-size-asian="14pt" style:font-size-complex="14pt"/>
    </style:style>
    <style:style style:name="P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justify" fo:line-height="150%"/>
      <style:text-properties style:font-name="Arial" fo:font-size="14pt" style:font-size-asian="14pt" style:font-size-complex="14pt"/>
    </style:style>
    <style:style style:name="P6" style:parent-style-name="Standard" style:family="paragraph">
      <style:paragraph-properties fo:text-align="justify" fo:line-height="150%"/>
      <style:text-properties style:font-name="Arial" fo:font-size="14pt" style:font-size-asian="14pt" style:font-size-complex="14pt"/>
    </style:style>
    <style:style style:name="P7" style:parent-style-name="Standard" style:family="paragraph">
      <style:paragraph-properties fo:text-align="justify" fo:line-height="150%"/>
      <style:text-properties style:font-name="Arial" fo:font-size="14pt" style:font-size-asian="14pt" style:font-size-complex="14pt"/>
    </style:style>
    <style:style style:name="P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0" style:parent-style-name="Standard" style:family="paragraph">
      <style:paragraph-properties fo:line-height="150%"/>
      <style:text-properties style:font-name="Arial" fo:font-size="14pt" style:font-size-asian="14pt" style:font-size-complex="14pt"/>
    </style:style>
    <style:style style:name="P11" style:parent-style-name="Standard" style:family="paragraph">
      <style:paragraph-properties fo:line-height="150%"/>
      <style:text-properties style:font-name="Arial" fo:font-size="14pt" style:font-size-asian="14pt" style:font-size-complex="14pt"/>
    </style:style>
    <style:style style:name="P12" style:parent-style-name="Standard" style:family="paragraph">
      <style:paragraph-properties fo:line-height="150%"/>
      <style:text-properties style:font-name="Arial" fo:font-size="14pt" style:font-size-asian="14pt" style:font-size-complex="14pt"/>
    </style:style>
  </office:automatic-styles>
  <office:body>
    <office:text text:use-soft-page-breaks="true">
      <text:p text:style-name="P1">CAROLINE FALERO</text:p>
      <text:p text:style-name="P2">Diretora, atriz, produtora, arte educadora e artesã.<text:s/>Doutoranda<text:s/>pela UFRGS.</text:p>
      <text:p text:style-name="P3">Pesquisadora no grupo de pesquisa GINGA – Grupo Interseccional de Pesquisas em Negritude, Gênero e Arte.<text:s/>desenvolve uma pesquisa unindo poéticas do Teatro de animação, bonecas abayomis e as relações étnico-raciais e de gênero para refletir sobre metodologias e possibilidades de desenvolvimento de ERER - Educação para as Relação Étnico-Raciais no campo das Artes Cênicas e das práticas antirracistas nas relações sociais.</text:p>
      <text:p text:style-name="P4"/>
      <text:p text:style-name="P5"/>
      <text:p text:style-name="P6"/>
      <text:p text:style-name="P7">Diretora, atriz, produtora, arte educadora e artesã. Natural de Porto Alegre/RS. Possui Graduação em Licenciatura em Teatro pela Universidade Estadual do Rio Grande do Sul (UERGS). Mestre em Artes Cênicas pela<text:s/>Universidade Federal do Rio Grande do Sul (UFRGS), onde atualmente é doutoranda. Pesquisadora no grupo de pesquisa GINGA – Grupo Interseccional de Pesquisas em Negritude, Gênero e Arte. Atualmente desenvolve uma pesquisa unindo poéticas do Teatro de animação, bonecas abayomis e as relações étnico-raciais e de gênero para refletir sobre metodologias e possibilidades de desenvolvimento de ERER - Educação para as Relação Étnico-Raciais no campo das Artes Cênicas e das práticas antirracistas nas relações sociais.</text:p>
      <text:p text:style-name="P8"/>
      <text:p text:style-name="P9"/>
      <text:p text:style-name="P10">Instagram @abayomifalero</text:p>
      <text:p text:style-name="P11">Face @carolinefalero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aine Regina Santos</dc:creator>
    <meta:creation-date>2025-09-10T07:07:00Z</meta:creation-date>
    <dc:date>2026-01-31T00:17:00Z</dc:date>
    <meta:template xlink:href="Normal" xlink:type="simple"/>
    <meta:editing-cycles>4</meta:editing-cycles>
    <meta:editing-duration>PT180S</meta:editing-duration>
    <meta:document-statistic meta:page-count="1" meta:paragraph-count="2" meta:word-count="201" meta:character-count="1290" meta:row-count="9" meta:non-whitespace-character-count="1091"/>
  </office:meta>
</office:document-meta>
</file>