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Arial" fo:font-size="9pt" style:font-size-asian="9pt" style:font-size-complex="9pt"/>
    </style:style>
    <style:style style:name="P2" style:parent-style-name="Standard" style:family="paragraph">
      <style:paragraph-properties fo:text-align="justify"/>
      <style:text-properties style:font-name="Arial" fo:font-size="9pt" style:font-size-asian="9pt" style:font-size-complex="9pt"/>
    </style:style>
    <style:style style:name="P3" style:parent-style-name="Standard" style:family="paragraph">
      <style:paragraph-properties fo:text-align="justify"/>
      <style:text-properties style:font-name="Arial" fo:font-size="9pt" style:font-size-asian="9pt" style:font-size-complex="9pt"/>
    </style:style>
    <style:style style:name="P4" style:parent-style-name="Standard" style:family="paragraph">
      <style:text-properties style:font-name="Arial" fo:font-size="9pt" style:font-size-asian="9pt" style:font-size-complex="9pt"/>
    </style:style>
    <style:style style:name="P5" style:parent-style-name="Standard" style:family="paragraph">
      <style:text-properties style:font-name="Arial" fo:font-size="9pt" style:font-size-asian="9pt" style:font-size-complex="9pt"/>
    </style:style>
    <style:style style:name="P6" style:parent-style-name="Standard" style:family="paragraph">
      <style:text-properties style:font-name="Arial" fo:font-size="9pt" style:font-size-asian="9pt" style:font-size-complex="9pt"/>
    </style:style>
  </office:automatic-styles>
  <office:body>
    <office:text text:use-soft-page-breaks="true">
      <text:p text:style-name="P1">CAROLINE FALERO</text:p>
      <text:p text:style-name="P2"/>
      <text:p text:style-name="P3">Diretora, atriz, produtora, arte educadora e artesã. Natural de Porto Alegre/RS. Possui Graduação em Licenciatura em Teatro pela Universidade Estadual do Rio Grande do Sul (UERGS). Mestre em Artes Cênicas pela<text:s/>Universidade Federal do Rio Grande do Sul (UFRGS), onde atualmente é doutoranda. Pesquisadora no grupo de pesquisa GINGA – Grupo Interseccional de Pesquisas em Negritude, Gênero e Arte. Atualmente desenvolve uma pesquisa unindo poéticas do Teatro de animação, bonecas abayomis e as relações étnico-raciais e de gênero para refletir sobre metodologias e possibilidades de desenvolvimento de ERER - Educação para as Relação Étnico-Raciais no campo das Artes Cênicas e das práticas antirracistas nas relações sociais.</text:p>
      <text:p text:style-name="Standard"/>
      <text:p text:style-name="Standard"/>
      <text:p text:style-name="P4">Instagram @abayomifalero</text:p>
      <text:p text:style-name="P5">Face<text:s/>@carolinefalero</text:p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aine Regina Santos</dc:creator>
    <meta:creation-date>2025-09-10T07:07:00Z</meta:creation-date>
    <dc:date>2025-09-12T21:17:00Z</dc:date>
    <meta:template xlink:href="Normal" xlink:type="simple"/>
    <meta:editing-cycles>3</meta:editing-cycles>
    <meta:editing-duration>PT0S</meta:editing-duration>
    <meta:document-statistic meta:page-count="1" meta:paragraph-count="1" meta:word-count="123" meta:character-count="790" meta:row-count="5" meta:non-whitespace-character-count="668"/>
  </office:meta>
</office:document-meta>
</file>